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3000003B8E5A60E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105c" officeooo:paragraph-rsid="0019105c"/>
    </style:style>
    <style:style style:name="P2" style:family="paragraph" style:parent-style-name="Standard">
      <style:text-properties fo:font-weight="bold" officeooo:rsid="0019105c" officeooo:paragraph-rsid="0019105c" style:font-weight-asian="bold" style:font-weight-complex="bold"/>
    </style:style>
    <style:style style:name="P3" style:family="paragraph" style:parent-style-name="Standard">
      <style:text-properties fo:font-weight="bold" officeooo:rsid="0019d008" officeooo:paragraph-rsid="0019d008" style:font-weight-asian="bold" style:font-weight-complex="bold"/>
    </style:style>
    <style:style style:name="P4" style:family="paragraph" style:parent-style-name="Standard">
      <style:text-properties fo:font-weight="bold" officeooo:rsid="001acd71" officeooo:paragraph-rsid="001acd71" style:font-weight-asian="bold" style:font-weight-complex="bold"/>
    </style:style>
    <style:style style:name="P5" style:family="paragraph" style:parent-style-name="Standard">
      <style:text-properties fo:font-weight="bold" officeooo:rsid="001ba6f5" officeooo:paragraph-rsid="001ba6f5" style:font-weight-asian="bold" style:font-weight-complex="bold"/>
    </style:style>
    <style:style style:name="P6" style:family="paragraph" style:parent-style-name="Standard">
      <style:text-properties fo:font-weight="bold" officeooo:rsid="001d3ebb" officeooo:paragraph-rsid="001d3ebb" style:font-weight-asian="bold" style:font-weight-complex="bold"/>
    </style:style>
    <style:style style:name="P7" style:family="paragraph" style:parent-style-name="Standard">
      <style:text-properties fo:font-weight="normal" officeooo:rsid="0019105c" officeooo:paragraph-rsid="0019105c" style:font-weight-asian="normal" style:font-weight-complex="normal"/>
    </style:style>
    <style:style style:name="P8" style:family="paragraph" style:parent-style-name="Standard">
      <style:text-properties fo:font-weight="normal" officeooo:rsid="0019d008" officeooo:paragraph-rsid="0019d008" style:font-weight-asian="normal" style:font-weight-complex="normal"/>
    </style:style>
    <style:style style:name="P9" style:family="paragraph" style:parent-style-name="Standard">
      <style:text-properties fo:font-weight="normal" officeooo:rsid="001acd71" officeooo:paragraph-rsid="001acd71" style:font-weight-asian="normal" style:font-weight-complex="normal"/>
    </style:style>
    <style:style style:name="P10" style:family="paragraph" style:parent-style-name="Standard">
      <style:text-properties fo:font-weight="normal" officeooo:rsid="001ba6f5" officeooo:paragraph-rsid="001ba6f5" style:font-weight-asian="normal" style:font-weight-complex="normal"/>
    </style:style>
    <style:style style:name="P11" style:family="paragraph" style:parent-style-name="Standard">
      <style:text-properties fo:font-weight="normal" officeooo:rsid="001d3ebb" officeooo:paragraph-rsid="001d3ebb" style:font-weight-asian="normal" style:font-weight-complex="normal"/>
    </style:style>
    <style:style style:name="P12" style:family="paragraph" style:parent-style-name="Standard">
      <style:text-properties officeooo:rsid="001ba6f5" officeooo:paragraph-rsid="001ba6f5"/>
    </style:style>
    <style:style style:name="P13" style:family="paragraph" style:parent-style-name="Standard" style:list-style-name="L1">
      <style:text-properties fo:font-weight="normal" officeooo:rsid="0019105c" officeooo:paragraph-rsid="0019105c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9d008" officeooo:paragraph-rsid="0019d008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9d008" officeooo:paragraph-rsid="0019d008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acd71" officeooo:paragraph-rsid="001acd71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1acd71" officeooo:paragraph-rsid="001acd71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1ba6f5" officeooo:paragraph-rsid="001ba6f5" style:font-weight-asian="normal" style:font-weight-complex="normal"/>
    </style:style>
    <style:style style:name="P19" style:family="paragraph" style:parent-style-name="Standard" style:list-style-name="L8">
      <style:text-properties fo:font-weight="normal" officeooo:rsid="001ba6f5" officeooo:paragraph-rsid="001ba6f5" style:font-weight-asian="normal" style:font-weight-complex="normal"/>
    </style:style>
    <style:style style:name="P20" style:family="paragraph" style:parent-style-name="Standard" style:list-style-name="L9">
      <style:text-properties fo:font-weight="normal" officeooo:rsid="001d3ebb" officeooo:paragraph-rsid="001d3ebb" style:font-weight-asian="normal" style:font-weight-complex="normal"/>
    </style:style>
    <style:style style:name="P21" style:family="paragraph" style:parent-style-name="Standard" style:list-style-name="L10">
      <style:text-properties fo:font-weight="normal" officeooo:rsid="001d3ebb" officeooo:paragraph-rsid="001d3ebb" style:font-weight-asian="normal" style:font-weight-complex="normal"/>
    </style:style>
    <style:style style:name="P22" style:family="paragraph" style:parent-style-name="Standard" style:list-style-name="L11">
      <style:text-properties fo:font-weight="normal" officeooo:rsid="001d3ebb" officeooo:paragraph-rsid="001d3ebb" style:font-weight-asian="normal" style:font-weight-complex="normal"/>
    </style:style>
    <style:style style:name="P23" style:family="paragraph" style:parent-style-name="Standard" style:list-style-name="L12">
      <style:text-properties fo:font-weight="normal" officeooo:rsid="001d3ebb" officeooo:paragraph-rsid="001d3ebb" style:font-weight-asian="normal" style:font-weight-complex="normal"/>
    </style:style>
    <style:style style:name="P24" style:family="paragraph" style:parent-style-name="Standard">
      <style:text-properties fo:font-weight="normal" officeooo:rsid="001d3ebb" officeooo:paragraph-rsid="001d3ebb" style:font-weight-asian="normal" style:font-weight-complex="normal"/>
    </style:style>
    <style:style style:name="P25" style:family="paragraph" style:parent-style-name="Standard" style:list-style-name="L13">
      <style:text-properties fo:font-weight="normal" officeooo:rsid="001d4ab8" officeooo:paragraph-rsid="001d4ab8" style:font-weight-asian="normal" style:font-weight-complex="normal"/>
    </style:style>
    <style:style style:name="P26" style:family="paragraph" style:parent-style-name="Standard">
      <style:text-properties fo:font-weight="bold" officeooo:rsid="0019105c" officeooo:paragraph-rsid="0019105c" style:font-weight-asian="bold" style:font-weight-complex="bold"/>
    </style:style>
    <style:style style:name="P27" style:family="paragraph" style:parent-style-name="Standard">
      <style:text-properties fo:font-weight="bold" officeooo:rsid="001d4ab8" officeooo:paragraph-rsid="001d4ab8" style:font-weight-asian="bold" style:font-weight-complex="bold"/>
    </style:style>
    <style:style style:name="P28" style:family="paragraph" style:parent-style-name="Standard" style:list-style-name="L6">
      <style:text-properties officeooo:rsid="001acd71" officeooo:paragraph-rsid="001acd71"/>
    </style:style>
    <style:style style:name="P29" style:family="paragraph" style:parent-style-name="Standard" style:list-style-name="L6">
      <style:text-properties officeooo:rsid="001ba6f5" officeooo:paragraph-rsid="001ba6f5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cial GPS Notes</text:p>
      <text:p text:style-name="P1"/>
      <text:p text:style-name="P1"/>
      <text:p text:style-name="P1">Sidebar lists app, data quality, fire benefits, etc (see screenshot below) but you need to be on “app” to actually use the application. Are these visible by mistake? </text:p>
      <text:p text:style-name="P1"/>
      <text:p text:style-name="P1"><draw:frame draw:style-name="fr1" draw:name="Image1" text:anchor-type="char" svg:width="17.59cm" svg:height="8.931cm" draw:z-index="0"><draw:image xlink:href="Pictures/1000000000000753000003B8E5A60E6C.png" xlink:type="simple" xlink:show="embed" xlink:actuate="onLoad" draw:mime-type="image/png"/></draw:frame><text:s/></text:p>
      <text:p text:style-name="P1"/>
      <text:p text:style-name="P2">Spending</text:p>
      <text:list text:style-name="L1">
        <text:list-item>
          <text:p text:style-name="P13">Can expenses be offset by another transaction? For example, if banking fees are $5 then a rebate is deposited and coded to the same category – will it reduce the expense? The same would apply to other types of transactions – if user paid for something then received etransfers to be paid back; can these etransfers reduce the expense?</text:p>
        </text:list-item>
      </text:list>
      <text:p text:style-name="P7"/>
      <text:p text:style-name="P2">Forecast</text:p>
      <text:list text:style-name="L2">
        <text:list-item>
          <text:p text:style-name="P14">Conservative and optimistic return 0 – might not have things configured correctly. </text:p>
        </text:list-item>
        <text:list-item>
          <text:p text:style-name="P14">Expected just returns negative like you will be broke. </text:p>
        </text:list-item>
        <text:list-item>
          <text:p text:style-name="P14">Should incorporate more variables – seems very basic forecast</text:p>
        </text:list-item>
      </text:list>
      <text:p text:style-name="P8"/>
      <text:p text:style-name="P3">Scenarios </text:p>
      <text:list text:style-name="L3">
        <text:list-item>
          <text:p text:style-name="P15">Same as above</text:p>
        </text:list-item>
        <text:list-item>
          <text:p text:style-name="P15">Creating scenarios should be more in depth by incorporating the apps existing scenarios together. </text:p>
          <text:list>
            <text:list-item>
              <text:p text:style-name="P15">For example: A scenario can include buying a house and new job. </text:p>
              <text:list>
                <text:list-item>
                  <text:p text:style-name="P15">I don’t like in the scenarios builder that in the example of creating a new job; the commute cost change is a set field. The fields should be fully customizable based on your spending categories. </text:p>
                </text:list-item>
                <text:list-item>
                  <text:p text:style-name="P15">The user should be able to add these types of fields themselves</text:p>
                </text:list-item>
              </text:list>
            </text:list-item>
          </text:list>
        </text:list-item>
      </text:list>
      <text:p text:style-name="P8"/>
      <text:p text:style-name="P8">** Reference ProjectionLab for this area of the application. </text:p>
      <text:p text:style-name="P4"><text:soft-page-break/>Goals</text:p>
      <text:list text:style-name="L4">
        <text:list-item>
          <text:p text:style-name="P16">I don’t really know how goals work; my vision with these is that they’d be able to update themselves based on your imported transactions but if you do not save enough it should be detected. </text:p>
          <text:list>
            <text:list-item>
              <text:p text:style-name="P16">Example: If user wanted to create $5000 vacation goal; how will they know what they have leftover that can be allocated towards this goal. </text:p>
            </text:list-item>
          </text:list>
        </text:list-item>
        <text:list-item>
          <text:p text:style-name="P16">Similar to a goal; should be a feature for gifts/birthday money buckets. </text:p>
          <text:list>
            <text:list-item>
              <text:p text:style-name="P16">User receives $500 in gifts then spends $250 – shouldn’t go against their expenses as it was a gift. </text:p>
            </text:list-item>
          </text:list>
        </text:list-item>
      </text:list>
      <text:p text:style-name="P9"/>
      <text:p text:style-name="P4">FIRE Planner - Financial Profile</text:p>
      <text:list text:style-name="L5">
        <text:list-item>
          <text:p text:style-name="P17">Onboarding Wizard should help to set this up</text:p>
        </text:list-item>
        <text:list-item>
          <text:p text:style-name="P17">DOB selection doesn’t let you select a day you were born; only lets you pick the 1<text:span text:style-name="T1">st</text:span>. Not sure if this matters</text:p>
        </text:list-item>
        <text:list-item>
          <text:p text:style-name="P17">Employment income seems to calculate off of whats imported into the bank transactions; however this would be after tax. Need to consider what would be better for forecasting – should user record their gross income? How do we factor taxes? How do other tools consider this?</text:p>
        </text:list-item>
        <text:list-item>
          <text:p text:style-name="P17">Years in canada after 18 box is confusing; same with Canadian resident. If you are a resident then does this even need to be a box? </text:p>
        </text:list-item>
      </text:list>
      <text:p text:style-name="P4"/>
      <text:p text:style-name="P4"><text:bookmark text:name=":r39a:"/><text:bookmark text:name="forecast"/>FIRE Planner - Account Room Tracker</text:p>
      <text:list text:style-name="L6">
        <text:list-item>
          <text:p text:style-name="P28">Unsure if tracking the account room is a priority but would be nice down the road – need to research if there would be an easy way to import this information from either CRA or users bank csv. </text:p>
        </text:list-item>
        <text:list-item>
          <text:p text:style-name="P29">Might be helpful to reference ProjectionLab again – they allow you to setup the different accounts</text:p>
        </text:list-item>
      </text:list>
      <text:p text:style-name="P12"/>
      <text:p text:style-name="P5">Benefits Workspace</text:p>
      <text:list text:style-name="L7">
        <text:list-item>
          <text:p text:style-name="P18">Unsure how this is useful/if it should be it’s own section. Definitely useful for forecasting but maybe this would be a section within? Just a thought not a hard change.</text:p>
        </text:list-item>
      </text:list>
      <text:p text:style-name="P10"/>
      <text:p text:style-name="P5">Fire Goal Setup</text:p>
      <text:list text:style-name="L8">
        <text:list-item>
          <text:p text:style-name="P19">Need the different fire variants explained. User may not know the difference or what is best for them.</text:p>
        </text:list-item>
      </text:list>
      <text:p text:style-name="P6">FIRE Forecast</text:p>
      <text:list text:style-name="L9">
        <text:list-item>
          <text:p text:style-name="P20">Consolidate with the other forecast menu? They are ultimately providing the same thing. </text:p>
        </text:list-item>
      </text:list>
      <text:p text:style-name="P11"/>
      <text:p text:style-name="P6">Fire Scenarios</text:p>
      <text:list text:style-name="L10">
        <text:list-item>
          <text:p text:style-name="P21">Same thing mentioned above but consolidated with the scenarios menu</text:p>
        </text:list-item>
      </text:list>
      <text:p text:style-name="P6">Data Quality</text:p>
      <text:list text:style-name="L11">
        <text:list-item>
          <text:p text:style-name="P22">Good – should be minimal concerns after user completes setup wizard </text:p>
        </text:list-item>
      </text:list>
      <text:p text:style-name="P11"/>
      <text:p text:style-name="P6">Settings</text:p>
      <text:list text:style-name="L12">
        <text:list-item>
          <text:p text:style-name="P23">Should be more organized into different sections after clicking onto the settings page. </text:p>
          <text:list>
            <text:list-item>
              <text:p text:style-name="P23">Profile settings broken out, categorization rules, categories, etc. </text:p>
            </text:list-item>
          </text:list>
        </text:list-item>
      </text:list>
      <text:p text:style-name="P11"/>
      <text:p text:style-name="P27"/>
      <text:p text:style-name="P27"/>
      <text:p text:style-name="P27"/>
      <text:p text:style-name="P27"><text:soft-page-break/>Misc notes:</text:p>
      <text:list text:style-name="L13">
        <text:list-item>
          <text:p text:style-name="P25">Programs to reference: MonarchMoney, YNAB, ProjectionLab</text:p>
          <text:list>
            <text:list-item>
              <text:p text:style-name="P25">Should bank accounts reconcile/show account balance to tie to source?</text:p>
            </text:list-item>
            <text:list-item>
              <text:p text:style-name="P25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30.368475762</meta:creation-date>
    <dc:date>2026-07-21T17:55:00.406811250</dc:date>
    <meta:editing-duration>PT1H16M17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3" meta:paragraph-count="46" meta:word-count="619" meta:character-count="3559" meta:non-whitespace-character-count="2985"/>
  </office:meta>
</office:document-meta>
</file>